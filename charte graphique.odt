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master-page-name="">
      <style:paragraph-properties fo:margin-left="0cm" fo:margin-right="0cm" fo:margin-top="0cm" fo:margin-bottom="0.141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2" style:family="paragraph" style:parent-style-name="Heading_20_2" style:master-page-name="">
      <style:paragraph-properties fo:margin-left="0cm" fo:margin-right="0cm" fo:margin-top="0cm" fo:margin-bottom="0.141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3" style:family="paragraph" style:parent-style-name="Heading_20_2" style:master-page-name="">
      <style:paragraph-properties fo:margin-left="0cm" fo:margin-right="0cm" fo:margin-top="0cm" fo:margin-bottom="0.141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4" style:family="paragraph" style:parent-style-name="Heading_20_2" style:master-page-name="">
      <style:paragraph-properties fo:margin-left="0cm" fo:margin-right="0cm" fo:margin-top="0cm" fo:margin-bottom="0.141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5" style:family="paragraph" style:parent-style-name="Heading_20_2" style:master-page-name="">
      <style:paragraph-properties fo:margin-left="0cm" fo:margin-right="0cm" fo:margin-top="0cm" fo:margin-bottom="0.141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6" style:family="paragraph" style:parent-style-name="Heading_20_3" style:master-page-name="">
      <style:paragraph-properties fo:margin-left="0cm" fo:margin-right="0cm" fo:margin-top="0cm" fo:margin-bottom="0.141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7" style:family="paragraph" style:parent-style-name="Heading_20_3" style:master-page-name="">
      <style:paragraph-properties fo:margin-left="0cm" fo:margin-right="0cm" fo:margin-top="0cm" fo:margin-bottom="0.141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8" style:family="paragraph" style:parent-style-name="Heading_20_3" style:master-page-name="">
      <style:paragraph-properties fo:margin-left="0cm" fo:margin-right="0cm" fo:margin-top="0cm" fo:margin-bottom="0.141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9" style:family="paragraph" style:parent-style-name="Heading_20_3" style:master-page-name="">
      <style:paragraph-properties fo:margin-left="0cm" fo:margin-right="0cm" fo:margin-top="0cm" fo:margin-bottom="0.141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10" style:family="paragraph" style:parent-style-name="Heading_20_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1" style:family="paragraph" style:parent-style-name="Heading_20_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2" style:family="paragraph" style:parent-style-name="Text_20_body" style:master-page-name="">
      <style:paragraph-properties fo:margin-left="0cm" fo:margin-right="0cm" fo:margin-top="0cm" fo:margin-bottom="0.176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3" style:family="paragraph" style:parent-style-name="Text_20_body" style:master-page-name="">
      <style:paragraph-properties fo:margin-left="0cm" fo:margin-right="0cm" fo:margin-top="0cm" fo:margin-bottom="0.176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4" style:family="paragraph" style:parent-style-name="Text_20_body" style:master-page-name="">
      <style:paragraph-properties fo:margin-left="0cm" fo:margin-right="0cm" fo:margin-top="0cm" fo:margin-bottom="0.176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5" style:family="paragraph" style:parent-style-name="Text_20_body" style:master-page-name="">
      <style:paragraph-properties fo:margin-left="0cm" fo:margin-right="0cm" fo:margin-top="0cm" fo:margin-bottom="0.176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6" style:family="paragraph" style:parent-style-name="Text_20_body" style:master-page-name="">
      <style:paragraph-properties fo:margin-left="0cm" fo:margin-right="0cm" fo:margin-top="0cm" fo:margin-bottom="0.176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7" style:family="paragraph" style:parent-style-name="Text_20_body" style:master-page-name="">
      <style:paragraph-properties fo:margin-left="0cm" fo:margin-right="0cm" fo:margin-top="0cm" fo:margin-bottom="0.176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8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9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0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1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2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3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4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5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6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7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8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9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0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1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2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3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4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fo:font-weight="bold" loext:padding="0cm" loext:border="none"/>
    </style:style>
    <style:style style:name="P35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fo:font-weight="bold" loext:padding="0cm" loext:border="none"/>
    </style:style>
    <style:style style:name="P36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fo:font-weight="bold" loext:padding="0cm" loext:border="none"/>
    </style:style>
    <style:style style:name="P37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fo:font-weight="bold" loext:padding="0cm" loext:border="none"/>
    </style:style>
    <style:style style:name="P38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39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40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41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42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43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44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45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46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47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48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49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50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51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52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53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54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55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56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57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58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59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60" style:family="paragraph" style:parent-style-name="Text_20_body" style:list-style-name="L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61" style:family="paragraph" style:parent-style-name="Text_20_body" style:list-style-name="L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62" style:family="paragraph" style:parent-style-name="Text_20_body" style:list-style-name="L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63" style:family="paragraph" style:parent-style-name="Text_20_body" style:list-style-name="L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64" style:family="paragraph" style:parent-style-name="Text_20_body" style:list-style-name="L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65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66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67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68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69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70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T1" style:family="text">
      <style:text-properties fo:font-weight="bold" loext:padding="0cm" loext:border="none"/>
    </style:style>
    <style:style style:name="T2" style:family="text">
      <style:text-properties fo:color="#1f1f1f" loext:opacity="100%" style:font-name="Google Sans Text"/>
    </style:style>
    <style:style style:name="T3" style:family="text">
      <style:text-properties fo:color="#1f1f1f" loext:opacity="100%" style:font-name="Google Sans Text" fo:font-weight="bold" loext:padding="0cm" loext:border="none"/>
    </style:style>
    <style:style style:name="T4" style:family="text">
      <style:text-properties fo:color="#1f1f1f" loext:opacity="100%" style:font-name="Google Sans Text" fo:font-style="italic" loext:padding="0cm" loext:border="none"/>
    </style:style>
    <style:style style:name="T5" style:family="text">
      <style:text-properties fo:color="#1f1f1f" loext:opacity="100%" style:font-name="Google Sans"/>
    </style:style>
    <style:style style:name="T6" style:family="text">
      <style:text-properties fo:color="#1f1f1f" loext:opacity="100%" loext:padding="0cm" loext:border="none"/>
    </style:style>
    <style:style style:name="T7" style:family="text">
      <style:text-properties fo:color="#444746" loext:opacity="100%" style:font-name="Google Sans Text" loext:padding="0cm" loext:border="none"/>
    </style:style>
    <style:style style:name="T8" style:family="text">
      <style:text-properties fo:color="#444746" loext:opacity="100%" style:font-name="Google Sans Text" fo:font-weight="bold" loext:padding="0cm" loext:border="none"/>
    </style:style>
    <style:style style:name="T9" style:family="text">
      <style:text-properties fo:font-style="italic" loext:padding="0cm" loext:border="non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section text:style-name="Sect1" text:name="model-response-message-contentr_6cec4af0ccfa1677">
        <text:p text:style-name="Horizontal_20_Line"/>
        <text:h text:style-name="P1" text:outline-level="1">CHARTE GRAPHIQUE — PROJET « L'ÎLE AU FRUIT »</text:h>
        <text:p text:style-name="P18">Ce document définit l'identité visuelle de l'application web <text:span text:style-name="T1">L'Île au Fruit</text:span>. Il précise l'organisation des couleurs pour le mode clair (normal) et le mode sombre (dark), les choix typographiques, ainsi que les règles graphiques appliquées aux composants clés de l'interface utilisateur.</text:p>
        <text:p text:style-name="Horizontal_20_Line"/>
        <text:h text:style-name="P2" text:outline-level="2">1. PALETTE DE COULEURS</text:h>
        <text:p text:style-name="P12">L'univers colorimétrique de l'application est directement inspiré de la nature, de la fraîcheur et des fruits. Il s'articule autour de nuances de vert, dynamisées par des touches de jaune vif.</text:p>
        <text:h text:style-name="P6" text:outline-level="3">1.1. Mode Clair (Mode Normal)</text:h>
        <text:p text:style-name="P12">Le mode clair utilise des fonds lumineux pour offrir une interface aérée, propre et stimulante.</text:p>
        <text:list text:style-name="L1">
          <text:list-item>
            <text:p text:style-name="P38"><text:span text:style-name="T3">Vert Principal (Identité) :</text:span><text:span text:style-name="T2"> </text:span><text:span text:style-name="Source_20_Text"><text:span text:style-name="T7">#014d14</text:span></text:span><text:span text:style-name="T2"> (ou </text:span><text:span text:style-name="Source_20_Text"><text:span text:style-name="T7">#015a17</text:span></text:span><text:span text:style-name="T2">)</text:span></text:p>
            <text:list>
              <text:list-item>
                <text:p text:style-name="P38"><text:span text:style-name="T4">Usage :</text:span><text:span text:style-name="T2"> Titres principaux (</text:span><text:span text:style-name="Source_20_Text"><text:span text:style-name="T7">h1</text:span></text:span><text:span text:style-name="T2">, </text:span><text:span text:style-name="Source_20_Text"><text:span text:style-name="T7">h2</text:span></text:span><text:span text:style-name="T2">), prix des produits et éléments d'identité forts.</text:span></text:p>
              </text:list-item>
            </text:list>
          </text:list-item>
          <text:list-item>
            <text:p text:style-name="P38"><text:span text:style-name="T3">Vert Secondaire :</text:span><text:span text:style-name="T2"> </text:span><text:span text:style-name="Source_20_Text"><text:span text:style-name="T7">#00704b</text:span></text:span></text:p>
            <text:list>
              <text:list-item>
                <text:p text:style-name="P21"><text:span text:style-name="T9">Usage :</text:span> Arrière-plans secondaires, dégradés d'avatars et survol de liens.</text:p>
              </text:list-item>
            </text:list>
          </text:list-item>
          <text:list-item>
            <text:p text:style-name="P38"><text:span text:style-name="T3">Couleur d'Accentuation :</text:span><text:span text:style-name="T2"> </text:span><text:span text:style-name="Source_20_Text"><text:span text:style-name="T7">#ffd900</text:span></text:span><text:span text:style-name="T2"> (Jaune Fruit)</text:span></text:p>
            <text:list>
              <text:list-item>
                <text:p text:style-name="P21"><text:span text:style-name="T9">Usage :</text:span> Boutons d'action prioritaires (ex: ajouter au panier) et badges de fidélité.</text:p>
              </text:list-item>
            </text:list>
          </text:list-item>
          <text:list-item>
            <text:p text:style-name="P38"><text:span text:style-name="T3">Couleur de Fond de Page :</text:span><text:span text:style-name="T2"> </text:span><text:span text:style-name="Source_20_Text"><text:span text:style-name="T7">#ffffff</text:span></text:span><text:span text:style-name="T2"> (Blanc) ou </text:span><text:span text:style-name="Source_20_Text"><text:span text:style-name="T7">#f5f5f5</text:span></text:span><text:span text:style-name="T2"> (Gris très clair)</text:span></text:p>
            <text:list>
              <text:list-item>
                <text:p text:style-name="P21"><text:span text:style-name="T9">Usage :</text:span> Arrière-plan global du site pour garantir une luminosité maximale.</text:p>
              </text:list-item>
            </text:list>
          </text:list-item>
          <text:list-item>
            <text:p text:style-name="P38"><text:span text:style-name="T3">Couleur des Blocs / Cartes :</text:span><text:span text:style-name="T2"> </text:span><text:span text:style-name="Source_20_Text"><text:span text:style-name="T7">#ffffff</text:span></text:span></text:p>
            <text:list>
              <text:list-item>
                <text:p text:style-name="P21"><text:span text:style-name="T9">Usage :</text:span> Conteneurs des fiches produits, formulaires et blocs de profil.</text:p>
              </text:list-item>
            </text:list>
          </text:list-item>
          <text:list-item>
            <text:p text:style-name="P38"><text:span text:style-name="T3">Texte Principal :</text:span><text:span text:style-name="T2"> </text:span><text:span text:style-name="Source_20_Text"><text:span text:style-name="T7">#1a1a1a</text:span></text:span><text:span text:style-name="T2"> (Gris très sombre, presque noir)</text:span></text:p>
            <text:list>
              <text:list-item>
                <text:p text:style-name="P21"><text:span text:style-name="T9">Usage :</text:span> Paragraphes, descriptions et titres de niveau 3.</text:p>
              </text:list-item>
            </text:list>
          </text:list-item>
          <text:list-item>
            <text:p text:style-name="P38"><text:span text:style-name="T3">Texte Secondaire :</text:span><text:span text:style-name="T2"> </text:span><text:span text:style-name="Source_20_Text"><text:span text:style-name="T7">#6b7280</text:span></text:span><text:span text:style-name="T2"> (Gris neutre)</text:span></text:p>
            <text:list>
              <text:list-item>
                <text:p text:style-name="P21"><text:span text:style-name="T9">Usage :</text:span> Petites mentions, indications secondaires et dates de commande.</text:p>
              </text:list-item>
            </text:list>
          </text:list-item>
        </text:list>
        <text:h text:style-name="P10" text:outline-level="3"><text:span text:style-name="T5">1.2. Mode Sombre (Dark Mode — </text:span><text:span text:style-name="Source_20_Text"><text:span text:style-name="T7">dark.css</text:span></text:span><text:span text:style-name="T5">)</text:span></text:h>
        <text:p text:style-name="P18">Pour éviter la fatigue oculaire, le mode sombre n'utilise pas un noir pur mais un <text:span text:style-name="T1">Vert Abyssal</text:span> très profond, maintenant ainsi le thème de la marque.</text:p>
        <text:list text:style-name="L2">
          <text:list-item>
            <text:p text:style-name="P46"><text:span text:style-name="T3">Fond de Page (Body) :</text:span><text:span text:style-name="T2"> </text:span><text:span text:style-name="Source_20_Text"><text:span text:style-name="T7">#0f1814</text:span></text:span><text:span text:style-name="T2"> (Vert-noir très sombre)</text:span></text:p>
            <text:list>
              <text:list-item>
                <text:p text:style-name="P27"><text:span text:style-name="T9">Usage :</text:span> Remplace le fond blanc de la page.</text:p>
              </text:list-item>
            </text:list>
          </text:list-item>
          <text:list-item>
            <text:p text:style-name="P46"><text:span text:style-name="T3">Fond des Blocs (Cards) :</text:span><text:span text:style-name="T2"> </text:span><text:span text:style-name="Source_20_Text"><text:span text:style-name="T7">#1a2722</text:span></text:span></text:p>
            <text:list>
              <text:list-item>
                <text:p text:style-name="P27"><text:span text:style-name="T9">Usage :</text:span> Remplace le fond blanc des fiches produits et des sections du profil.</text:p>
              </text:list-item>
            </text:list>
          </text:list-item>
          <text:list-item>
            <text:p text:style-name="P46"><text:span text:style-name="T3">Vert Lumineux (Contraste) :</text:span><text:span text:style-name="T2"> </text:span><text:span text:style-name="Source_20_Text"><text:span text:style-name="T7">#6dd9a8</text:span></text:span></text:p>
            <text:list>
              <text:list-item>
                <text:p text:style-name="P27"><text:span text:style-name="T9">Usage :</text:span> Utilisé pour faire ressortir les titres, les prix et les éléments actifs sur fond sombre.</text:p>
              </text:list-item>
            </text:list>
          </text:list-item>
          <text:list-item>
            <text:p text:style-name="P46"><text:span text:style-name="T3">Vert Émeraude :</text:span><text:span text:style-name="T2"> </text:span><text:span text:style-name="Source_20_Text"><text:span text:style-name="T7">#3da874</text:span></text:span></text:p>
            <text:list>
              <text:list-item>
                <text:p text:style-name="P27"><text:soft-page-break/><text:span text:style-name="T9">Usage :</text:span> Fond des boutons principaux en mode sombre (ex: boutons de connexion ou de modification).</text:p>
              </text:list-item>
            </text:list>
          </text:list-item>
          <text:list-item>
            <text:p text:style-name="P46"><text:span text:style-name="T3">Fond des Champs de Saisie :</text:span><text:span text:style-name="T2"> </text:span><text:span text:style-name="Source_20_Text"><text:span text:style-name="T7">#243832</text:span></text:span></text:p>
            <text:list>
              <text:list-item>
                <text:p text:style-name="P27"><text:span text:style-name="T9">Usage :</text:span> Arrière-plan des barres de recherche et des inputs de formulaires.</text:p>
              </text:list-item>
            </text:list>
          </text:list-item>
          <text:list-item>
            <text:p text:style-name="P46"><text:span text:style-name="T3">Texte Principal :</text:span><text:span text:style-name="T2"> </text:span><text:span text:style-name="Source_20_Text"><text:span text:style-name="T7">#e8efe9</text:span></text:span><text:span text:style-name="T2"> (Vert-blanc très clair)</text:span></text:p>
            <text:list>
              <text:list-item>
                <text:p text:style-name="P27"><text:span text:style-name="T9">Usage :</text:span> Contenu textuel principal pour assurer une excellente lisibilité.</text:p>
              </text:list-item>
            </text:list>
          </text:list-item>
          <text:list-item>
            <text:p text:style-name="P46"><text:span text:style-name="T3">Texte Adouci :</text:span><text:span text:style-name="T2"> </text:span><text:span text:style-name="Source_20_Text"><text:span text:style-name="T7">#9aa8a0</text:span></text:span><text:span text:style-name="T2"> (Gris-vert doux)</text:span></text:p>
            <text:list>
              <text:list-item>
                <text:p text:style-name="P27"><text:span text:style-name="T9">Usage :</text:span> Libellés secondaires, légendes et indications discrètes.</text:p>
              </text:list-item>
            </text:list>
          </text:list-item>
        </text:list>
        <text:p text:style-name="Horizontal_20_Line"/>
        <text:h text:style-name="P2" text:outline-level="2">2. TYPOGRAPHIE</text:h>
        <text:p text:style-name="P12">L'application utilise une police de caractères unique, moderne et géométrique pour renforcer la cohérence visuelle.</text:p>
        <text:list text:style-name="L3">
          <text:list-item>
            <text:p text:style-name="P53"><text:span text:style-name="T3">Police Unique :</text:span><text:span text:style-name="T2"> </text:span><text:span text:style-name="Source_20_Text"><text:span text:style-name="T7">Poppins</text:span></text:span><text:span text:style-name="T2"> (importée depuis Google Fonts).</text:span></text:p>
          </text:list-item>
          <text:list-item>
            <text:p text:style-name="P34">Graisses et Usages (Weights) :</text:p>
            <text:list>
              <text:list-item>
                <text:p text:style-name="P53"><text:span text:style-name="Source_20_Text"><text:span text:style-name="T7">300 (Light)</text:span></text:span><text:span text:style-name="T2"> : Textes optionnels ou décorations légères.</text:span></text:p>
              </text:list-item>
              <text:list-item>
                <text:p text:style-name="P53"><text:span text:style-name="Source_20_Text"><text:span text:style-name="T7">400 (Regular)</text:span></text:span><text:span text:style-name="T2"> : Corps de texte, paragraphes de description, options de filtres.</text:span></text:p>
              </text:list-item>
              <text:list-item>
                <text:p text:style-name="P53"><text:span text:style-name="Source_20_Text"><text:span text:style-name="T7">600 (Semi-Bold)</text:span></text:span><text:span text:style-name="T2"> : Titres intermédiaires, labels de formulaires et texte des boutons.</text:span></text:p>
              </text:list-item>
              <text:list-item>
                <text:p text:style-name="P53"><text:span text:style-name="Source_20_Text"><text:span text:style-name="T7">700 (Bold)</text:span></text:span><text:span text:style-name="T2"> : Titres de pages (</text:span><text:span text:style-name="Source_20_Text"><text:span text:style-name="T7">h1</text:span></text:span><text:span text:style-name="T2">), affichage des prix et indicateurs importants (ex: niveau de fidélité).</text:span></text:p>
              </text:list-item>
            </text:list>
          </text:list-item>
        </text:list>
        <text:p text:style-name="Horizontal_20_Line"/>
        <text:h text:style-name="P2" text:outline-level="2">3. COMPOSANTS D'INTERFACE (UI) &amp; FORMES</text:h>
        <text:p text:style-name="P12">Le site web utilise des formes adoucies et arrondies pour rappeler le côté organique et naturel de ses produits.</text:p>
        <text:h text:style-name="P10" text:outline-level="3"><text:span text:style-name="T5">3.1. Les Cartes de Contenu (</text:span><text:span text:style-name="Source_20_Text"><text:span text:style-name="T7">.card</text:span></text:span><text:span text:style-name="T5">, </text:span><text:span text:style-name="Source_20_Text"><text:span text:style-name="T7">.product-card</text:span></text:span><text:span text:style-name="T5">)</text:span></text:h>
        <text:list text:style-name="L4">
          <text:list-item>
            <text:p text:style-name="P58"><text:span text:style-name="T3">En Mode Clair :</text:span><text:span text:style-name="T2"> Coins arrondis importants (</text:span><text:span text:style-name="Source_20_Text"><text:span text:style-name="T7">border-radius: 24px</text:span></text:span><text:span text:style-name="T2"> à </text:span><text:span text:style-name="Source_20_Text"><text:span text:style-name="T7">30px</text:span></text:span><text:span text:style-name="T2">), fond blanc et ombre portée très douce (</text:span><text:span text:style-name="Source_20_Text"><text:span text:style-name="T7">box-shadow: 0 4px 20px rgba(0,0,0,0.06)</text:span></text:span><text:span text:style-name="T2">).</text:span></text:p>
          </text:list-item>
          <text:list-item>
            <text:p text:style-name="P58"><text:span text:style-name="T3">En Mode Sombre :</text:span><text:span text:style-name="T2"> Fond sombre </text:span><text:span text:style-name="Source_20_Text"><text:span text:style-name="T7">#1a2722</text:span></text:span><text:span text:style-name="T2">, l'ombre est supprimée et remplacée par une bordure fine et discrète (</text:span><text:span text:style-name="Source_20_Text"><text:span text:style-name="T7">1px solid rgba(255,255,255,0.08)</text:span></text:span><text:span text:style-name="T2">) pour détacher le bloc du fond de la page.</text:span></text:p>
          </text:list-item>
        </text:list>
        <text:h text:style-name="P6" text:outline-level="3">3.2. Les Boutons et Éléments de Saisie</text:h>
        <text:list text:style-name="L5">
          <text:list-item>
            <text:p text:style-name="P60"><text:span text:style-name="T3">Boutons Principaux (</text:span><text:span text:style-name="Source_20_Text"><text:span text:style-name="T8">.btn-add</text:span></text:span><text:span text:style-name="T3">) :</text:span><text:span text:style-name="T2"> Arrondis complets style pilule (</text:span><text:span text:style-name="Source_20_Text"><text:span text:style-name="T7">border-radius: 50px</text:span></text:span><text:span text:style-name="T2">). En mode clair, le fond est jaune (</text:span><text:span text:style-name="Source_20_Text"><text:span text:style-name="T7">#ffd900</text:span></text:span><text:span text:style-name="T2">) avec écriture sombre (</text:span><text:span text:style-name="Source_20_Text"><text:span text:style-name="T7">#4d3d00</text:span></text:span><text:span text:style-name="T2">). Au survol, un léger effet d'agrandissement dynamique est appliqué (</text:span><text:span text:style-name="Source_20_Text"><text:span text:style-name="T7">transform: scale(1.08)</text:span></text:span><text:span text:style-name="T2">).</text:span></text:p>
          </text:list-item>
          <text:list-item>
            <text:p text:style-name="P60"><text:span text:style-name="T3">Barres de Recherche et Inputs :</text:span><text:span text:style-name="T2"> Forme ovale pilule (</text:span><text:span text:style-name="Source_20_Text"><text:span text:style-name="T7">50px</text:span></text:span><text:span text:style-name="T2">). En mode clair, la bordure grise passe au vert au clic (</text:span><text:span text:style-name="Source_20_Text"><text:span text:style-name="T7">focus</text:span></text:span><text:span text:style-name="T2">). En mode sombre, le fond s'adapte en devenant vert foncé (</text:span><text:span text:style-name="Source_20_Text"><text:span text:style-name="T7">#243832</text:span></text:span><text:span text:style-name="T2">) pour ne pas éblouir l'utilisateur.</text:span></text:p>
          </text:list-item>
        </text:list>
        <text:p text:style-name="Horizontal_20_Line"/>
        <text:h text:style-name="P2" text:outline-level="2">4. CODES COULEURS SÉMANTIQUES (STATUTS &amp; BADGES)</text:h>
        <text:p text:style-name="P12">Pour simplifier la navigation, l'application applique des couleurs sémantiques spécifiques selon le type d'information affichée.</text:p>
        <text:h text:style-name="P6" text:outline-level="3"><text:soft-page-break/>4.1. Badges des Régimes Alimentaires (Fiche Produit)</text:h>
        <text:p text:style-name="P12">Les filtres utilisent des fonds pastel très clairs en mode clair pour ne pas alourdir la page :</text:p>
        <text:list text:style-name="L6">
          <text:list-item>
            <text:p text:style-name="P62"><text:span text:style-name="T6">🌱 </text:span><text:span text:style-name="T3">Vegan :</text:span><text:span text:style-name="T2"> Fond vert clair (</text:span><text:span text:style-name="Source_20_Text"><text:span text:style-name="T7">#e8f5e9</text:span></text:span><text:span text:style-name="T2">) / Texte vert foncé (</text:span><text:span text:style-name="Source_20_Text"><text:span text:style-name="T7">#2e7d32</text:span></text:span><text:span text:style-name="T2">).</text:span></text:p>
          </text:list-item>
          <text:list-item>
            <text:p text:style-name="P62"><text:span text:style-name="T6">🥕 </text:span><text:span text:style-name="T3">Végétarien :</text:span><text:span text:style-name="T2"> Fond orange clair (</text:span><text:span text:style-name="Source_20_Text"><text:span text:style-name="T7">#fff3e0</text:span></text:span><text:span text:style-name="T2">) / Texte orange foncé (</text:span><text:span text:style-name="Source_20_Text"><text:span text:style-name="T7">#e65100</text:span></text:span><text:span text:style-name="T2">).</text:span></text:p>
          </text:list-item>
          <text:list-item>
            <text:p text:style-name="P62"><text:span text:style-name="T6">🌾 </text:span><text:span text:style-name="T3">Sans Gluten :</text:span><text:span text:style-name="T2"> Fond jaune clair (</text:span><text:span text:style-name="Source_20_Text"><text:span text:style-name="T7">#fff9c4</text:span></text:span><text:span text:style-name="T2">) / Texte ambre foncé (</text:span><text:span text:style-name="Source_20_Text"><text:span text:style-name="T7">#f57f17</text:span></text:span><text:span text:style-name="T2">).</text:span></text:p>
          </text:list-item>
        </text:list>
        <text:h text:style-name="P6" text:outline-level="3">4.2. Statuts des Commandes (Espace Profil)</text:h>
        <text:list text:style-name="L7">
          <text:list-item>
            <text:p text:style-name="P35">Livrée (Succès) :</text:p>
            <text:list>
              <text:list-item>
                <text:p text:style-name="P65"><text:span text:style-name="T4">Mode Clair :</text:span><text:span text:style-name="T2"> Fond vert clair (</text:span><text:span text:style-name="Source_20_Text"><text:span text:style-name="T7">#e8f5e9</text:span></text:span><text:span text:style-name="T2">) et texte vert (</text:span><text:span text:style-name="Source_20_Text"><text:span text:style-name="T7">#2e7d32</text:span></text:span><text:span text:style-name="T2">).</text:span></text:p>
              </text:list-item>
              <text:list-item>
                <text:p text:style-name="P65"><text:span text:style-name="T4">Mode Sombre :</text:span><text:span text:style-name="T2"> Fond vert transparent (</text:span><text:span text:style-name="Source_20_Text"><text:span text:style-name="T7">rgba(46, 125, 50, 0.25)</text:span></text:span><text:span text:style-name="T2">) et texte vert pastel (</text:span><text:span text:style-name="Source_20_Text"><text:span text:style-name="T7">#8fe0a0</text:span></text:span><text:span text:style-name="T2">).</text:span></text:p>
              </text:list-item>
            </text:list>
          </text:list-item>
          <text:list-item>
            <text:p text:style-name="P35">En cours / En préparation (Attente) :</text:p>
            <text:list>
              <text:list-item>
                <text:p text:style-name="P65"><text:span text:style-name="T4">Mode Clair :</text:span><text:span text:style-name="T2"> Fond orange clair (</text:span><text:span text:style-name="Source_20_Text"><text:span text:style-name="T7">#fff3e0</text:span></text:span><text:span text:style-name="T2">) et texte orange (</text:span><text:span text:style-name="Source_20_Text"><text:span text:style-name="T7">#e65100</text:span></text:span><text:span text:style-name="T2">).</text:span></text:p>
              </text:list-item>
              <text:list-item>
                <text:p text:style-name="P65"><text:span text:style-name="T4">Mode Sombre :</text:span><text:span text:style-name="T2"> Fond orange transparent (</text:span><text:span text:style-name="Source_20_Text"><text:span text:style-name="T7">rgba(230, 81, 0, 0.25)</text:span></text:span><text:span text:style-name="T2">) et texte orange pastel (</text:span><text:span text:style-name="Source_20_Text"><text:span text:style-name="T7">#ffb380</text:span></text:span><text:span text:style-name="T2">).</text:span></text:p>
              </text:list-item>
            </text:list>
          </text:list-item>
          <text:list-item>
            <text:p text:style-name="P35">Annulée / Refusée / Erreur (Danger) :</text:p>
            <text:list>
              <text:list-item>
                <text:p text:style-name="P65"><text:span text:style-name="T4">Mode Clair :</text:span><text:span text:style-name="T2"> Fond rouge clair (</text:span><text:span text:style-name="Source_20_Text"><text:span text:style-name="T7">#f8d7da</text:span></text:span><text:span text:style-name="T2">) et texte rouge foncé (</text:span><text:span text:style-name="Source_20_Text"><text:span text:style-name="T7">#721c24</text:span></text:span><text:span text:style-name="T2">).</text:span></text:p>
              </text:list-item>
              <text:list-item>
                <text:p text:style-name="P65"><text:span text:style-name="T4">Mode Sombre :</text:span><text:span text:style-name="T2"> Fond rouge transparent (</text:span><text:span text:style-name="Source_20_Text"><text:span text:style-name="T7">rgba(192, 57, 43, 0.2)</text:span></text:span><text:span text:style-name="T2">) et texte rouge pastel (</text:span><text:span text:style-name="Source_20_Text"><text:span text:style-name="T7">#f5a39a</text:span></text:span><text:span text:style-name="T2">).</text:span></text:p>
              </text:list-item>
            </text:list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18T00:42:41.236000000</meta:creation-date>
    <dc:date>2026-05-18T00:43:18.032000000</dc:date>
    <meta:editing-duration>PT40S</meta:editing-duration>
    <meta:editing-cycles>1</meta:editing-cycles>
    <meta:document-statistic meta:table-count="0" meta:image-count="0" meta:object-count="0" meta:page-count="3" meta:paragraph-count="69" meta:word-count="872" meta:character-count="5265" meta:non-whitespace-character-count="4510"/>
    <meta:generator>LibreOffice/7.4.1.2$Windows_X86_64 LibreOffice_project/3c58a8f3a960df8bc8fd77b461821e42c061c5f0</meta:generator>
  </office:meta>
</office:document-meta>
</file>